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7d1" officeooo:paragraph-rsid="000a77d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77d1" officeooo:paragraph-rsid="000a77d1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</text:span>: Hugo</text:p>
      <text:p text:style-name="P2">Apellidos<text:span text:style-name="T2">: Ortiz Durán</text:span></text:p>
      <text:p text:style-name="P2">Edad<text:span text:style-name="T2">: 17 añ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07:54.514292300</meta:creation-date>
    <dc:date>2025-09-25T12:12:27.190850500</dc:date>
    <meta:editing-duration>PT4M34S</meta:editing-duration>
    <meta:editing-cycles>1</meta:editing-cycles>
    <meta:document-statistic meta:table-count="0" meta:image-count="0" meta:object-count="0" meta:page-count="1" meta:paragraph-count="3" meta:word-count="8" meta:character-count="47" meta:non-whitespace-character-count="42"/>
    <meta:generator>LibreOffice/25.8.1.1$Windows_X86_64 LibreOffice_project/54047653041915e595ad4e45cccea684809c77b5</meta:generator>
  </office:meta>
</office:document-meta>
</file>